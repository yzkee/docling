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umber of freshwater ducks per yea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Freshwater Ducks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 office:value-type="float" office:value="180" calcext:value-type="float">
            <text:p>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 style:data-style-name="N2" text:time-value="15:48:49.48526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9T14:50:11.888942000</meta:creation-date>
    <dc:date>2026-06-09T15:50:38.041798000</dc:date>
    <meta:editing-duration>PT5M30S</meta:editing-duration>
    <meta:editing-cycles>3</meta:editing-cycles>
    <meta:generator>LibreOffice/26.2.3.2$MacOSX_AARCH64 LibreOffice_project/70e089b17412e4cb7773e41413306b17a2328c34</meta:generator>
    <meta:document-statistic meta:table-count="1" meta:cell-count="15" meta:object-count="0"/>
  </office:meta>
</office:document-meta>
</file>